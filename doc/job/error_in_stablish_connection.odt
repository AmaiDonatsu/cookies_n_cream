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fo:line-height="150%"/>
      <style:text-properties fo:font-size="14pt" officeooo:rsid="00021b58" officeooo:paragraph-rsid="00021b58" style:font-size-asian="14pt" style:font-size-complex="14pt"/>
    </style:style>
    <style:style style:name="P2" style:family="paragraph" style:parent-style-name="Standard">
      <style:paragraph-properties fo:margin-top="0.101cm" fo:margin-bottom="0.101cm" style:contextual-spacing="false" fo:line-height="150%"/>
      <style:text-properties officeooo:rsid="00021b58" officeooo:paragraph-rsid="00021b58"/>
    </style:style>
    <style:style style:name="P3" style:family="paragraph" style:parent-style-name="Standard">
      <style:paragraph-properties fo:margin-top="0.101cm" fo:margin-bottom="0.101cm" style:contextual-spacing="false" fo:line-height="150%"/>
      <style:text-properties officeooo:rsid="0000397f" officeooo:paragraph-rsid="0000397f"/>
    </style:style>
    <style:style style:name="P4" style:family="paragraph" style:parent-style-name="Standard">
      <style:paragraph-properties fo:margin-top="0.101cm" fo:margin-bottom="0.101cm" style:contextual-spacing="false" fo:line-height="150%"/>
      <style:text-properties fo:font-size="13pt" officeooo:rsid="00077013" officeooo:paragraph-rsid="00077013" style:font-size-asian="11.3500003814697pt" style:font-size-complex="13pt"/>
    </style:style>
    <style:style style:name="P5" style:family="paragraph" style:parent-style-name="Standard">
      <style:paragraph-properties fo:margin-top="0.101cm" fo:margin-bottom="0.101cm" style:contextual-spacing="false" fo:line-height="150%"/>
      <style:text-properties fo:font-size="12pt" officeooo:rsid="00077013" officeooo:paragraph-rsid="00077013" style:font-size-asian="10.5pt" style:font-size-complex="12pt"/>
    </style:style>
    <style:style style:name="P6" style:family="paragraph" style:parent-style-name="Standard">
      <style:paragraph-properties fo:margin-top="0.101cm" fo:margin-bottom="0.101cm" style:contextual-spacing="false" fo:line-height="150%"/>
      <style:text-properties fo:font-size="13pt" officeooo:rsid="00033d8d" officeooo:paragraph-rsid="00033d8d" style:font-size-asian="11.3500003814697pt" style:font-size-complex="13pt"/>
    </style:style>
    <style:style style:name="P7" style:family="paragraph" style:parent-style-name="Standard">
      <style:paragraph-properties fo:margin-top="0.101cm" fo:margin-bottom="0.101cm" style:contextual-spacing="false" fo:line-height="150%"/>
      <style:text-properties fo:font-size="12pt" officeooo:rsid="00033d8d" officeooo:paragraph-rsid="00033d8d" style:font-size-asian="10.5pt" style:font-size-complex="12pt"/>
    </style:style>
    <style:style style:name="P8" style:family="paragraph" style:parent-style-name="Standard">
      <style:paragraph-properties fo:margin-top="0.101cm" fo:margin-bottom="0.101cm" style:contextual-spacing="false" fo:line-height="150%"/>
      <style:text-properties officeooo:rsid="00033d8d" officeooo:paragraph-rsid="00033d8d"/>
    </style:style>
    <style:style style:name="T1" style:family="text">
      <style:text-properties officeooo:rsid="00021b58"/>
    </style:style>
    <style:style style:name="T2" style:family="text">
      <style:text-properties officeooo:rsid="00077013"/>
    </style:style>
    <style:style style:name="T3" style:family="text">
      <style:text-properties officeooo:rsid="000316d0"/>
    </style:style>
    <style:style style:name="T4" style:family="text">
      <style:text-properties officeooo:rsid="0006a4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 de acción para resolver problema de conexión entre dispositivo a server.</text:p>
      <text:p text:style-name="P2"/>
      <text:p text:style-name="P3">El desarrollo en <text:span text:style-name="T1">Linux</text:span> ha dado múltiples problemas a la hora de intentar conectar el dispositivo al servidor de la aplicación, <text:span text:style-name="T1">por lo que, se intentará cambiar el enfoque para poder trabajar en esta plataforma.</text:span></text:p>
      <text:p text:style-name="P3"/>
      <text:p text:style-name="P4">Contexto de funcionamiento.</text:p>
      <text:p text:style-name="P5">Es importante conocer bajo que contexto se piensa usar este proyecto y ecosistema, el cual se divide en 2 partes principales, aplicación web y dispositivo de telemetría (cookies_n_cream). Todo esto pertenece al ecosistema de Async Control, una plataforma que permite automatizaciones y monitoreo de IoT y telemetría, donde, el usuario al registrarse en la plataforma se le proporciona un dispositivo de telemetría con diferentes sensores, se le da acceso al código fuente y se le entrega un archivo con las credenciales necesarias para conectar de forma segura su dispositivo al servidor, así logrando hacer sus automatizaciones personalizadas. </text:p>
      <text:p text:style-name="P3"/>
      <text:p text:style-name="P6">Problema</text:p>
      <text:p text:style-name="P7">Imposibilidad de lograr una conexión del dispositivo sensor del usuario al servidor, apareciendo diferentes problemas en cada ciclo de &lt;intento de conexión → fallo → aplicar solución&gt;. Estos problemas comenzaron a aparecer tras la migración del desarrollo, pasando de windows donde fue inicializado todo el ecosistema a Linux Fedora.</text:p>
      <text:p text:style-name="P7">Los múltiples problemas e intentos de solución fueron registrados en `reports/summary_report.md` en el repositorio de cookies_n_cream <text:span text:style-name="T2">el cual es el repositorio que contiene el programa que subimos al esp32c6</text:span>.</text:p>
      <text:p text:style-name="P3"/>
      <text:p text:style-name="P2">Actualmente, la forma en la que se trabaja <text:span text:style-name="T3">en el servidor y manejo de datos,</text:span> es, mediante una base de datos simulada mediante archivos .json, esto se eligió así debido a que daba flexibilidad a la hora de modificar las tablas, leerlas y hacer debug con ayuda de IA sin tener que reiniciar ni borrar la base de datos en caso de que fuera sql, pero siendo aún más fácil de leer que una no sql, esto a largo plazo fue útil para conseguir una estructura más madura que se fue formando por sí sola a medida que la <text:soft-page-break/>aplicación era desarrollada, pero ahora es una limitación para poder debugear problemas relacionados con la conectividad del hardware.</text:p>
      <text:p text:style-name="P8">Otra limitación, es el trabajar todo en localhost, <text:span text:style-name="T4">al depender que todo funcione dentro del equipo con Fedora, la única solución posible es arreglar todos los problemas en este </text:span><text:span text:style-name="T2">mismo </text:span><text:span text:style-name="T4">equipo, </text:span><text:span text:style-name="T2">y no hay un punto claro donde todos los problemas vayan a ser solucionados</text:span><text:span text:style-name="T4">.</text:span></text:p>
      <text:p text:style-name="P6"/>
      <text:p text:style-name="P4">Soluciones</text:p>
      <text:p text:style-name="P5">1- Regresar temporalmente al equipo con Windows donde fue desarrollado todo el ecosistema originalmente, hacer el pull al repo local de todos los cambios registrados en el repo remoto y trabajar hasta asegurarnos de que todo se mantenga funcionando cómo originalmente lo hacía.</text:p>
      <text:p text:style-name="P5">2- Asegurarnos de que el ESP32c6 ejecute el programa sin estar necesariamente conectados por USB a la computadora, si no que, ejecute el programa solo con estar conectada a una fuente de alimentación sin transferencia de datos.</text:p>
      <text:p text:style-name="P5">3- Añadir una feature al esp32c6, para que sea posible flashearla usando un archivo que contenga las credenciales necesarias, es decir, que al flashearlo pueda recibir cómo argumento una ubicación dentro de la computadora, la cual contenga un archivo tipo .json el cual tenga definido las credenciales del internet, certs, etc. así crear los certificados exactos y la id del dispositivo que le asigno el servidor de la aplicación, además de, planear y definir un formato específico del archivo para ello.</text:p>
      <text:p text:style-name="P5">4- volviendo a Fedora, cambiar la base de datos, dejar de utilizar archivos .json en el directorio local, y comenzar a utilizar una base de datos no sql, de preferencia una alojada en la misma computadora.</text:p>
      <text:p text:style-name="P5">5- exponer por túnel la api del servidor de la aplicación, para que así sea posible la conexión entre el esp32c6 en un alimentador sin transferencia de datos al servidor.</text:p>
      <text:p text:style-name="P5"/>
      <text:p text:style-name="P5">Notas:</text:p>
      <text:p text:style-name="P5">será de suma importancia comenzar a trabajar en ambos equipos de forma simultánea, ya que, hasta no definir la api expuesta por el servidor no sabremos a que url o dirección, mqtt etc se conectará el dispositivo esp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8T19:09:00.173253641</meta:creation-date>
    <dc:date>2026-06-09T03:00:31.416176564</dc:date>
    <meta:editing-duration>PT1H40M13S</meta:editing-duration>
    <meta:editing-cycles>4</meta:editing-cycles>
    <meta:generator>LibreOffice/26.2.1.2$Linux_X86_64 LibreOffice_project/620$Build-2</meta:generator>
    <meta:document-statistic meta:table-count="0" meta:image-count="0" meta:object-count="0" meta:page-count="2" meta:paragraph-count="17" meta:word-count="655" meta:character-count="4034" meta:non-whitespace-character-count="3395"/>
  </office:meta>
</office:document-meta>
</file>